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xlink="http://www.w3.org/1999/xlink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xlink="http://www.w3.org/1999/xlink" xmlns:table="urn:oasis:names:tc:opendocument:xmlns:table:1.0" xmlns:manifest="urn:oasis:names:tc:opendocument:xmlns:manifest:1.0" office:version="1.2">
  <office:automatic-styles/>
  <office:body>
    <office:text>
      <text:p> <text:s text:c="3"/>Next Gen FNA — Northwoods <text:s text:c="4"/></text:p>
      <text:h text:outline-level="1">Next Gen FNA — Northwoods</text:h>
      <text:p> Internal working brief. Region: northern Michigan, Wisconsin, and Minnesota Arrowhead.</text:p>
      <text:p> Goal: Map what to do where to reduce wildfire risk to people, ecosystems, and services (water, carbon, recreation)—code-driven, customizable, multi-state, with a manageable (“Goldilocks”) treatment footprint.</text:p>
      <text:p> Strategic screening only—not NEPA, tribal consultation, or stand prescriptions.</text:p>
      <text:h text:outline-level="2"> <text:s text:c="1"/>1. Design intent</text:h>
      <text:p> Building blocks are standard (hexes, WRTC, LANDFIRE, PAD-US, dashboards). The product is defined by how they are combined:</text:p>
      <text:p>• Action classes on every hex—not only a risk heat map</text:p>
      <text:p>• Values to protect from wildfire as an extensible catalog (homes, plantations as assets, infrastructure); separate from PAD-US conservation lands</text:p>
      <text:p>• Silviculture then fire as its own class when sequencing matters</text:p>
      <text:p>• Ecosystem-specific rules (first draft from Randy; optional partner EVT workshop later)</text:p>
      <text:p>• Disturbance overlays that calibrate recommended actions (toggleable)</text:p>
      <text:p>• Mill / utilization feasibility for low-value wood</text:p>
      <text:p>• Carbon not a v1 ranking driver; smoke framing consistent with <text:a xlink:href="https://www.pnas.org/doi/10.1073/pnas.2613722123" xlink:type="simple">PNAS on Rx fire and PM2.5</text:a></text:p>
      <text:p>• Nested hexes designed in (10k-acre parents now; finer children later)</text:p>
      <text:p> <text:s text:c="1"/>Method and code should transfer to other regions by swapping AOI, hexes, values list, action rules, mills, and disturbance sources—not by copying Northwoods EVT biases blindly.</text:p>
      <text:p> v1 succeeds when hexes show action class, value type, ecosystem-aware logic, and disturbance-aware updates—not only “high exposure × high housing = red.”</text:p>
      <text:h text:outline-level="2"> <text:s text:c="1"/>2. Action classes</text:h>
      <text:p> Required on every hex. Avoid bare “protect” (conservation land-protection meaning).</text:p>
      <text:p>• Protect from wildfire — reduce wildfire damage to listed values (homes, plantations, infrastructure, others as added)</text:p>
      <text:p>• Silvicultural treatment — non-commercial thinning through commercial harvest; ecosystem-specific</text:p>
      <text:p>• Restore with beneficial fire — prescribed, managed, or cultural fire as the main tool</text:p>
      <text:p>• Silviculture then fire — thin/harvest first when needed for safe or effective fire</text:p>
      <text:p>• Defer / monitor — wrong place or time, peat caution, active/recent burn, or no feasible outlet</text:p>
      <text:p> <text:s text:c="1"/>Each ecosystem has different needs and opportunities. ICO / variable-density thinning is one example for some dense red pine plantations—not a regional template. <text:a xlink:href="https://doi.org/10.1016/j.foreco.2012.02.033" xlink:type="simple">Larson &amp; Churchill 2012</text:a>; <text:a xlink:href="https://pmc.ncbi.nlm.nih.gov/articles/PMC11082040/" xlink:type="simple">Hanna et al. 2024</text:a>.</text:p>
      <text:h text:outline-level="2"> <text:s text:c="1"/>3. Analysis approach</text:h>
      <text:p>• Region first on existing WFE hexes (~6,895 × ~10,000 acres). Prior work: <text:a xlink:href="https://rswaty.github.io/northwoods/" xlink:type="simple">site</text:a>, <text:a xlink:href="https://github.com/rswaty/northwoods" xlink:type="simple">repo</text:a> (read-only for this project; do not edit).</text:p>
      <text:p>• Per hex: WFE; values to protect; PAD-US; LANDFIRE EVT + Randy’s first-draft rules; mill feasibility; disturbances.</text:p>
      <text:p>• People: <text:a xlink:href="https://wildfirerisk.org/download/" xlink:type="simple">WRTC</text:a> Housing Unit Risk/Exposure. <text:a xlink:href="https://silvis.forest.wisc.edu/data/wui-change/" xlink:type="simple">SILVIS WUI</text:a> optional label only (2020).</text:p>
      <text:p>• Goldilocks: top 5% / 10% (or capacity caps) under weight presets.</text:p>
      <text:p>• Later: case studies (Arrowhead, Two Hearted, northern LP ice storm); nested hexes; optional partner EVT workshop.</text:p>
      <text:h text:outline-level="2"> <text:s text:c="2"/>4. Values to protect from wildfire</text:h>
      <text:p> Extensible catalog. Plantations are an economic asset value, not only an EVT type and not the same as PAD-US “protected areas.”</text:p>
      <table:table table:name="t1">
        <table:table-row>
          <table:table-cell office:value-type="string">
            <text:p>value_id</text:p>
          </table:table-cell>
          <table:table-cell office:value-type="string">
            <text:p>Value</text:p>
          </table:table-cell>
          <table:table-cell office:value-type="string">
            <text:p>Map with</text:p>
          </table:table-cell>
        </table:table-row>
        <table:table-row>
          <table:table-cell office:value-type="string">
            <text:p>homes_communities</text:p>
          </table:table-cell>
          <table:table-cell office:value-type="string">
            <text:p>Homes and communities</text:p>
          </table:table-cell>
          <table:table-cell office:value-type="string">
            <text:p><text:a xlink:href="https://wildfirerisk.org/download/" xlink:type="simple">WRTC</text:a></text:p>
          </table:table-cell>
        </table:table-row>
        <table:table-row>
          <table:table-cell office:value-type="string">
            <text:p>plantations</text:p>
          </table:table-cell>
          <table:table-cell office:value-type="string">
            <text:p>Timber plantations</text:p>
          </table:table-cell>
          <table:table-cell office:value-type="string">
            <text:p>EVT / local layers; flags in first-draft rules</text:p>
          </table:table-cell>
        </table:table-row>
        <table:table-row>
          <table:table-cell office:value-type="string">
            <text:p>infrastructure</text:p>
          </table:table-cell>
          <table:table-cell office:value-type="string">
            <text:p>Critical infrastructure</text:p>
          </table:table-cell>
          <table:table-cell office:value-type="string">
            <text:p>Partner layers when available</text:p>
          </table:table-cell>
        </table:table-row>
        <table:table-row>
          <table:table-cell office:value-type="string">
            <text:p>future_value</text:p>
          </table:table-cell>
          <table:table-cell office:value-type="string">
            <text:p>Additional values (cultural sites, intakes, recreation hubs, etc.)</text:p>
          </table:table-cell>
          <table:table-cell office:value-type="string">
            <text:p>New row + layer</text:p>
          </table:table-cell>
        </table:table-row>
      </table:table>
      <text:p> <text:s text:c="1"/>Add a value: Propose → Spatialize → Register in config/values_to_protect.csv → Score per hex → Weight in dashboard → Link to Protect from wildfire.</text:p>
      <text:h text:outline-level="2"> <text:s text:c="1"/>5. Ecosystem logic</text:h>
      <text:p> <text:a xlink:href="https://landfire.gov/vegetation/evt" xlink:type="simple">LANDFIRE EVT</text:a> identifies vegetation. First dashboard draft uses Randy’s rules only (documented config). A multi-partner EVT workshop is a later step after the regional product works.</text:p>
      <text:h text:outline-level="2"> <text:s text:c="1"/>6. Dashboard and disturbances</text:h>
      <text:p>• First draft from Randy’s scoring rules, weights, and value list</text:p>
      <text:p>• Presets: People-first | Plantation-asset-first | Biodiversity/recreation-first | Balanced</text:p>
      <text:p>• Toggle disturbance polygons (ice storm, fire); when on, calibrate actions; when off, show baseline</text:p>
      <text:p>• Versioned files in data/disturbances/; optional later GitHub Actions ingest</text:p>
      <text:h text:outline-level="2"> <text:s text:c="2"/>7. Mills and low-value wood</text:h>
      <text:p> Utilization is part of feasibility (distance to buyers; opportunity vs constrained).</text:p>
      <text:p> Sources: <text:a xlink:href="https://www2.dnr.state.mi.us/mfid/" xlink:type="simple">MI</text:a> · <text:a xlink:href="https://dnr.wisconsin.gov/topic/forestbusinesses/industries" xlink:type="simple">WI</text:a> · <text:a xlink:href="https://www.dnr.state.mn.us/forestry/um/index.html" xlink:type="simple">MN</text:a> · <text:a xlink:href="https://primary.forestproductslocator.org/mill-map" xlink:type="simple">Primary Forest Products mill map</text:a>. USFS <text:a xlink:href="https://research.fs.usda.gov/programs/nrum" xlink:type="simple">TPO</text:a> = aggregates only (mill points confidential).</text:p>
      <text:h text:outline-level="2"> <text:s text:c="1"/>8. Carbon, smoke, FIA</text:h>
      <text:p>• Carbon: not a v1 ranking driver</text:p>
      <text:p>• Smoke: <text:a xlink:href="https://www.pnas.org/doi/10.1073/pnas.2613722123" xlink:type="simple">PNAS</text:a>—Rx fire often increases net PM2.5 under current conditions; still essential for ecology and hazard where ecosystem logic supports it</text:p>
      <text:p>• FIA: no for v1 hex scoring. Optional later via <text:a xlink:href="https://research.fs.usda.gov/firelab/products/dataandtools/treemap-tree-level-model-united-states-forests" xlink:type="simple">TreeMap</text:a> on priority hexes only</text:p>
      <text:h text:outline-level="2"> <text:s text:c="2"/>9. Example relevant efforts from around the region</text:h>
      <text:p> Not exhaustive. Prefer priorities that can hand off to existing work.</text:p>
      <text:p>• MN: <text:a xlink:href="https://www.fs.usda.gov/r09/superior/natural-resources/forest-management/arrowhead-landscape-pilot-project" xlink:type="simple">Arrowhead Landscape Pilot</text:a>; Superior NF co-stewardship (Bois Forte, Fond du Lac, Grand Portage); <text:a xlink:href="https://www.minnesotafac.org/" xlink:type="simple">MN Fire Adapted Communities</text:a></text:p>
      <text:p>• WI: <text:a xlink:href="https://dnr.wisconsin.gov/topic/forestmanagement/gnaGeneralInfo" xlink:type="simple">CNNF Good Neighbor Authority</text:a>; northern CWPPs; <text:a xlink:href="https://www.superiorwi.gov/DocumentCenter/View/16070/Wisconsin_Point_Fire_Restoration_Fact_Sheet_2025" xlink:type="simple">Wisconsin Point fire restoration</text:a></text:p>
      <text:p>• MI: <text:a xlink:href="https://www.michigan.gov/dnr/about/newsroom/storm-recovery" xlink:type="simple">2025 ice storm recovery</text:a>; Hiawatha/Ottawa Rx fire; CWPPs; Two Hearted / TNC UP</text:p>
      <text:p>• Regional: <text:a xlink:href="https://compacts.csg.org/compact/great-lakes-forest-fire-compact/" xlink:type="simple">Great Lakes Forest Fire Compact</text:a>; <text:a xlink:href="https://gacc.nifc.gov/eacc/" xlink:type="simple">EACC</text:a>; <text:a xlink:href="https://www.nature.org/en-us/about-us/where-we-work/priority-landscapes/great-lakes/stories-in-the-great-lakes/great-lakes-northwoods/" xlink:type="simple">TNC Great Lakes Northwoods</text:a></text:p>
      <text:h text:outline-level="2"> <text:s text:c="2"/>10. Implementation</text:h>
      <text:p> Stack: new Python repo (this project). Laptop for code/docs; heavy machine for rasters via Git. Do not modify <text:a xlink:href="https://github.com/rswaty/northwoods" xlink:type="simple">rswaty/northwoods</text:a>.</text:p>
      <text:p> Phases: (1) regional hex scores + action classes → (2) dashboard first draft + disturbances → (3) mills + case studies → (4) nested hexes; optional TreeMap; optional partner workshop.</text:p>
      <text:p> Near term: repo scaffold; copy WFE hexes; join WRTC + PAD-US; first-draft action rules; top 5%/10% maps; disturbance schema stub; dashboard sketch.</text:p>
      <text:h text:outline-level="2"> <text:s text:c="1"/>11. Open items</text:h>
      <text:p>• Action-class thresholds; Goldilocks capacity; case-study boundaries</text:p>
      <text:p>• Dashboard platform</text:p>
      <text:p>• Disturbance automation sources</text:p>
      <text:p>• Timing of any multi-partner EVT workshop</text:p>
      <text:h text:outline-level="2"> <text:s text:c="2"/>12. Key links</text:h>
      <text:p>• <text:a xlink:href="https://rswaty.github.io/northwoods/" xlink:type="simple">Existing Northwoods assessment</text:a> · <text:a xlink:href="https://github.com/rswaty/northwoods" xlink:type="simple">repo</text:a></text:p>
      <text:p>• <text:a xlink:href="https://wildfirerisk.org/" xlink:type="simple">Wildfire Risk to Communities</text:a> · <text:a xlink:href="https://wildfirerisk.org/download/" xlink:type="simple">download</text:a></text:p>
      <text:p>• <text:a xlink:href="https://research.fs.usda.gov/firelab/products/dataandtools/wildfire-hazard-potential" xlink:type="simple">Wildfire Hazard Potential</text:a></text:p>
      <text:p>• <text:a xlink:href="https://landfire.gov/" xlink:type="simple">LANDFIRE</text:a> · <text:a xlink:href="https://landfire.gov/vegetation/evt" xlink:type="simple">EVT</text:a></text:p>
      <text:p>• <text:a xlink:href="https://www.usgs.gov/programs/gap-analysis-project/science/pad-us-data-download" xlink:type="simple">PAD-US</text:a> · <text:a xlink:href="https://silvis.forest.wisc.edu/data/wui-change/" xlink:type="simple">SILVIS WUI</text:a></text:p>
      <text:p>• <text:a xlink:href="https://www.pnas.org/doi/10.1073/pnas.2613722123" xlink:type="simple">PNAS — Rx fire and PM2.5</text:a></text:p>
      <text:p>• <text:a xlink:href="https://conservation-data-lab.github.io/cup_assessment/fire.html" xlink:type="simple">CUP WFE methods</text:a></text:p>
      <text:p>• <text:a xlink:href="https://doi.org/10.2737/RDS-2016-0003" xlink:type="simple">Bailey ecoregions (AOI)</text:a></text:p>
      <text:p>• <text:a xlink:href="https://data.fs.usda.gov/geodata/rastergateway/treemap/" xlink:type="simple">TreeMap</text:a> · <text:a xlink:href="https://research.fs.usda.gov/programs/fia" xlink:type="simple">FIA</text:a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xlink="http://www.w3.org/1999/xlink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xlink="http://www.w3.org/1999/xlink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