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, Arial, sans-serif"/>
    <style:font-face style:name="Consolas" svg:font-family="Consolas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868in" table:align="left"/>
    </style:style>
    <style:style style:name="Table1.A" style:family="table-column">
      <style:table-column-properties style:column-width="1.7097in"/>
    </style:style>
    <style:style style:name="Table1.B" style:family="table-column">
      <style:table-column-properties style:column-width="2.0035in"/>
    </style:style>
    <style:style style:name="Table1.C" style:family="table-column">
      <style:table-column-properties style:column-width="3.373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7.0868in" table:align="left"/>
    </style:style>
    <style:style style:name="Table2.A" style:family="table-column">
      <style:table-column-properties style:column-width="1.2924in"/>
    </style:style>
    <style:style style:name="Table2.B" style:family="table-column">
      <style:table-column-properties style:column-width="1.7632in"/>
    </style:style>
    <style:style style:name="Table2.C" style:family="table-column">
      <style:table-column-properties style:column-width="4.0313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xt Gen FNA — Northwoods</text:p>
      <text:p text:style-name="Text_20_body">Internal working brief. Region: northern Michigan, Wisconsin, and Minnesota Arrowhead.</text:p>
      <text:p text:style-name="Text_20_body"><text:span text:style-name="Strong_20_Emphasis">Goal:</text:span> Map <text:span text:style-name="Emphasis">what to do where</text:span> to reduce wildfire risk to people, ecosystems, and services (water, carbon, recreation)—code-driven, customizable, multi-state, with a manageable (“Goldilocks”) treatment footprint.</text:p>
      <text:p text:style-name="Text_20_body">Strategic screening only—not NEPA, tribal consultation, or stand prescriptions.</text:p>
      <text:h text:style-name="Heading_20_2" text:outline-level="2">1. Design intent</text:h>
      <text:p text:style-name="Text_20_body">Building blocks are standard (hexes, WRTC, LANDFIRE, PAD-US, dashboards). The product is defined by how they are combined:</text:p>
      <text:list text:style-name="L1">
        <text:list-item>
          <text:p text:style-name="P2"><text:span text:style-name="Strong_20_Emphasis">Action classes</text:span> on every hex—not only a risk heat map </text:p>
        </text:list-item>
        <text:list-item>
          <text:p text:style-name="P2"><text:span text:style-name="Strong_20_Emphasis">Values to protect from wildfire</text:span> as an extensible catalog (homes, plantations as assets, infrastructure); separate from PAD-US </text:p>
        </text:list-item>
        <text:list-item>
          <text:p text:style-name="P2"><text:span text:style-name="Strong_20_Emphasis">Plantations always Protect from wildfire</text:span>; silviculture is a treatment hint, not the action class </text:p>
        </text:list-item>
        <text:list-item>
          <text:p text:style-name="P2"><text:span text:style-name="Strong_20_Emphasis">EVT (v1)</text:span> flags peat (defer) and plantations only—not a full ecosystem→action table </text:p>
        </text:list-item>
        <text:list-item>
          <text:p text:style-name="P2"><text:span text:style-name="Strong_20_Emphasis">PAD-US as priority multiplier</text:span> (management feasibility + biodiversity/recreation value)—does not gate action; high people × high WFE outside PAD still count </text:p>
        </text:list-item>
        <text:list-item>
          <text:p text:style-name="P2"><text:span text:style-name="Strong_20_Emphasis">Disturbance overlays</text:span> that calibrate recommended actions (toggleable) </text:p>
        </text:list-item>
        <text:list-item>
          <text:p text:style-name="P2"><text:span text:style-name="Strong_20_Emphasis">Mill / utilization feasibility</text:span> for low-value wood </text:p>
        </text:list-item>
        <text:list-item>
          <text:p text:style-name="P2"><text:span text:style-name="Strong_20_Emphasis">Carbon</text:span> not a v1 ranking driver; smoke framing consistent with <text:a xlink:type="simple" xlink:href="https://www.pnas.org/doi/10.1073/pnas.2613722123" text:style-name="Internet_20_link" text:visited-style-name="Visited_20_Internet_20_Link">PNAS on Rx fire and PM2.5</text:a> </text:p>
        </text:list-item>
        <text:list-item>
          <text:p text:style-name="P2"><text:span text:style-name="Strong_20_Emphasis">Nested hexes</text:span> designed in (10k-acre parents now; finer children later) </text:p>
        </text:list-item>
        <text:list-item>
          <text:p text:style-name="P2"><text:span text:style-name="Strong_20_Emphasis">ArcGIS Pro + Python + R Quarto</text:span> — GIS/rasters in a local Pro project; Python in this repo (run in Pro); hex outputs pushed here for the R dashboard on GitHub Pages </text:p>
        </text:list-item>
        <text:list-item>
          <text:p text:style-name="P3"><text:span text:style-name="Strong_20_Emphasis">No rasters on GitHub</text:span> — hexes and small vectors only </text:p>
        </text:list-item>
      </text:list>
      <text:p text:style-name="Text_20_body">Method and code should transfer to other regions by swapping AOI, hexes, values list, rules, mills, and disturbance sources—not by copying Northwoods biases blindly.</text:p>
      <text:p text:style-name="Body_20_Text.note">v1 succeeds when hexes show action class, value context, peat/plantation flags, and disturbance-aware updates—not only “high exposure × high housing = red.”</text:p>
      <text:h text:style-name="Heading_20_2" text:outline-level="2">2. Action classes</text:h>
      <text:p text:style-name="Text_20_body">Required on every hex. Avoid bare “protect” (conservation land-protection meaning).</text:p>
      <text:list text:style-name="L2">
        <text:list-item>
          <text:p text:style-name="P4"><text:span text:style-name="Strong_20_Emphasis">Protect from wildfire</text:span> — reduce wildfire damage to listed values (homes, plantations, infrastructure, others as added) </text:p>
        </text:list-item>
        <text:list-item>
          <text:p text:style-name="P4"><text:span text:style-name="Strong_20_Emphasis">Silvicultural treatment</text:span> — non-commercial thinning through commercial harvest (v1: plantation <text:span text:style-name="Emphasis">treatment hint</text:span>, not primary action class) </text:p>
        </text:list-item>
        <text:list-item>
          <text:p text:style-name="P4"><text:span text:style-name="Strong_20_Emphasis">Restore with beneficial fire</text:span> — prescribed, managed, or cultural fire as the main tool </text:p>
        </text:list-item>
        <text:list-item>
          <text:p text:style-name="P4"><text:span text:style-name="Strong_20_Emphasis">Silviculture then fire</text:span> — thin/harvest first when needed (v1: plantation treatment hint when exposure is high) </text:p>
        </text:list-item>
        <text:list-item>
          <text:p text:style-name="P5"><text:span text:style-name="Strong_20_Emphasis">Defer / monitor</text:span> — peat caution, quiet hexes, active/recent burn, or no feasible outlet </text:p>
        </text:list-item>
      </text:list>
      <text:p text:style-name="Text_20_body">ICO / variable-density thinning is one example for some dense red pine plantations—not a regional template. <text:a xlink:type="simple" xlink:href="https://doi.org/10.1016/j.foreco.2012.02.033" text:style-name="Internet_20_link" text:visited-style-name="Visited_20_Internet_20_Link">Larson &amp; Churchill 2012</text:a>; <text:a xlink:type="simple" xlink:href="https://pmc.ncbi.nlm.nih.gov/articles/PMC11082040/" text:style-name="Internet_20_link" text:visited-style-name="Visited_20_Internet_20_Link">Hanna et al. 2024</text:a>.</text:p>
      <text:h text:style-name="Heading_20_3" text:outline-level="3">v1 action cascade (first match wins)</text:h>
      <text:list text:style-name="L3">
        <text:list-item>
          <text:p text:style-name="P6">Peat (EVT) → <text:span text:style-name="Strong_20_Emphasis">Defer / monitor</text:span> </text:p>
        </text:list-item>
        <text:list-item>
          <text:p text:style-name="P6">Plantation (EVT) → <text:span text:style-name="Strong_20_Emphasis">Protect from wildfire</text:span> (always) </text:p>
        </text:list-item>
        <text:list-item>
          <text:p text:style-name="P6">High WRTC Housing Unit Risk → <text:span text:style-name="Strong_20_Emphasis">Protect from wildfire</text:span> </text:p>
        </text:list-item>
        <text:list-item>
          <text:p text:style-name="P6">High WFE → <text:span text:style-name="Strong_20_Emphasis">Restore with beneficial fire</text:span> </text:p>
        </text:list-item>
        <text:list-item>
          <text:p text:style-name="P7">Else → <text:span text:style-name="Strong_20_Emphasis">Defer / monitor</text:span> </text:p>
        </text:list-item>
      </text:list>
      <text:p text:style-name="Text_20_body">PAD-US does not appear in the cascade. Full examples: <text:span text:style-name="Source_20_Text">config/ACTION_ASSIGNMENT.md</text:span>.</text:p>
      <text:h text:style-name="Heading_20_2" text:outline-level="2">3. Analysis approach</text:h>
      <text:list text:style-name="L4">
        <text:list-item>
          <text:p text:style-name="P8"><text:span text:style-name="Strong_20_Emphasis">Region first</text:span> on existing WFE hexes (~6,895 × ~10,000 acres). Prior work: <text:a xlink:type="simple" xlink:href="https://rswaty.github.io/northwoods/" text:style-name="Internet_20_link" text:visited-style-name="Visited_20_Internet_20_Link">site</text:a>, <text:a xlink:type="simple" xlink:href="https://github.com/rswaty/northwoods" text:style-name="Internet_20_link" text:visited-style-name="Visited_20_Internet_20_Link">repo</text:a> (read-only; do not edit). </text:p>
        </text:list-item>
        <text:list-item>
          <text:p text:style-name="P8"><text:span text:style-name="Strong_20_Emphasis">Per hex:</text:span> WFE; WRTC people layers; PAD-US multiplier; EVT peat/plantation flags; later mills and disturbances. </text:p>
        </text:list-item>
        <text:list-item>
          <text:p text:style-name="P8"><text:span text:style-name="Strong_20_Emphasis">Goldilocks:</text:span> top 5% / 10% (or capacity caps) under weight presets. Priority score = (homes + plantations + WFE) × (1 + PAD multiplier). </text:p>
        </text:list-item>
        <text:list-item>
          <text:p text:style-name="P9"><text:span text:style-name="Strong_20_Emphasis">Later:</text:span> case studies (Arrowhead, Two Hearted, northern LP ice storm); nested hexes; PAD category weights; optional partner EVT workshop; stand-condition overlays. </text:p>
        </text:list-item>
      </text:list>
      <text:h text:style-name="Heading_20_2" text:outline-level="2">4. Values to protect from wildfire</text:h>
      <text:p text:style-name="Text_20_body">Extensible catalog. Plantations are an <text:span text:style-name="Strong_20_Emphasis">economic asset</text:span> always assigned Protect from wildfire; silviculture may appear as a treatment hint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value_id</text:p>
          </table:table-cell>
          <table:table-cell table:style-name="Table1.A1" office:value-type="string">
            <text:p text:style-name="Table_20_Heading">Value</text:p>
          </table:table-cell>
          <table:table-cell table:style-name="Table1.A1" office:value-type="string">
            <text:p text:style-name="Table_20_Heading">Map with</text:p>
          </table:table-cell>
        </table:table-row>
        <table:table-row>
          <table:table-cell table:style-name="Table1.A1" office:value-type="string">
            <text:p text:style-name="Table_20_Contents">homes_communities</text:p>
          </table:table-cell>
          <table:table-cell table:style-name="Table1.A1" office:value-type="string">
            <text:p text:style-name="Table_20_Contents">Homes and communities</text:p>
          </table:table-cell>
          <table:table-cell table:style-name="Table1.A1" office:value-type="string">
            <text:p text:style-name="Table_20_Contents">WRTC (see §5)</text:p>
          </table:table-cell>
        </table:table-row>
        <table:table-row>
          <table:table-cell table:style-name="Table1.A1" office:value-type="string">
            <text:p text:style-name="Table_20_Contents">plantations</text:p>
          </table:table-cell>
          <table:table-cell table:style-name="Table1.A1" office:value-type="string">
            <text:p text:style-name="Table_20_Contents">Timber plantations</text:p>
          </table:table-cell>
          <table:table-cell table:style-name="Table1.A1" office:value-type="string">
            <text:p text:style-name="Table_20_Contents">LANDFIRE EVT / local layers; always Protect</text:p>
          </table:table-cell>
        </table:table-row>
        <table:table-row>
          <table:table-cell table:style-name="Table1.A1" office:value-type="string">
            <text:p text:style-name="Table_20_Contents">infrastructure</text:p>
          </table:table-cell>
          <table:table-cell table:style-name="Table1.A1" office:value-type="string">
            <text:p text:style-name="Table_20_Contents">Critical infrastructure</text:p>
          </table:table-cell>
          <table:table-cell table:style-name="Table1.A1" office:value-type="string">
            <text:p text:style-name="Table_20_Contents">Partner layers when available</text:p>
          </table:table-cell>
        </table:table-row>
        <table:table-row>
          <table:table-cell table:style-name="Table1.A1" office:value-type="string">
            <text:p text:style-name="Table_20_Contents">future_value</text:p>
          </table:table-cell>
          <table:table-cell table:style-name="Table1.A1" office:value-type="string">
            <text:p text:style-name="Table_20_Contents">Additional values</text:p>
          </table:table-cell>
          <table:table-cell table:style-name="Table1.A1" office:value-type="string">
            <text:p text:style-name="Table_20_Contents">New row + layer</text:p>
          </table:table-cell>
        </table:table-row>
      </table:table>
      <text:p text:style-name="Text_20_body"><text:span text:style-name="Strong_20_Emphasis">PAD-US</text:span> is not a values-to-protect action. It is a <text:span text:style-name="Strong_20_Emphasis">priority multiplier</text:span> (easier management on non-small-ownership lands + biodiversity/recreation value). High people × high WFE <text:span text:style-name="Emphasis">outside</text:span> PAD still ranks and can get Protect. v1 uses overlap fraction; later weight by PAD category (fee/federal/state vs easement).</text:p>
      <text:p text:style-name="Text_20_body"><text:span text:style-name="Strong_20_Emphasis">Add a value:</text:span> Propose → Spatialize → Register in <text:span text:style-name="Source_20_Text">config/values_to_protect.csv</text:span> → Score per hex → Weight in dashboard → Link to Protect from wildfire.</text:p>
      <text:h text:style-name="Heading_20_2" text:outline-level="2">5. Wildfire Risk to Communities (WRTC) datasets</text:h>
      <text:p text:style-name="Text_20_body">Source: <text:a xlink:type="simple" xlink:href="https://wildfirerisk.org/download/" text:style-name="Internet_20_link" text:visited-style-name="Visited_20_Internet_20_Link">wildfirerisk.org/download</text:a> (May 2024 GIS by state: MI, WI, MN). Rasters stay local. Details: <text:span text:style-name="Source_20_Text">config/WRTC_DATASETS.md</text:span>.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Heading">Role</text:p>
          </table:table-cell>
          <table:table-cell table:style-name="Table2.A1" office:value-type="string">
            <text:p text:style-name="Table_20_Heading">Dataset</text:p>
          </table:table-cell>
          <table:table-cell table:style-name="Table2.A1" office:value-type="string">
            <text:p text:style-name="Table_20_Heading">Us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Primary</text:span></text:p>
          </table:table-cell>
          <table:table-cell table:style-name="Table2.A1" office:value-type="string">
            <text:p text:style-name="Table_20_Contents"><text:span text:style-name="Strong_20_Emphasis">Housing Unit Risk</text:span></text:p>
          </table:table-cell>
          <table:table-cell table:style-name="Table2.A1" office:value-type="string">
            <text:p text:style-name="Table_20_Contents">Main people term; drives high-WRTC → Protect. Integrates likelihood, intensity, home susceptibility, and housing density where housing exists.</text:p>
          </table:table-cell>
        </table:table-row>
        <table:table-row>
          <table:table-cell table:style-name="Table2.A1" office:value-type="string">
            <text:p text:style-name="Table_20_Contents">Companion</text:p>
          </table:table-cell>
          <table:table-cell table:style-name="Table2.A1" office:value-type="string">
            <text:p text:style-name="Table_20_Contents"><text:span text:style-name="Strong_20_Emphasis">Housing Unit Exposure</text:span></text:p>
          </table:table-cell>
          <table:table-cell table:style-name="Table2.A1" office:value-type="string">
            <text:p text:style-name="Table_20_Contents">Expected housing units exposed per year (likelihood × density). Dashboard / alternate people view.</text:p>
          </table:table-cell>
        </table:table-row>
        <table:table-row>
          <table:table-cell table:style-name="Table2.A1" office:value-type="string">
            <text:p text:style-name="Table_20_Contents">Where homes are</text:p>
          </table:table-cell>
          <table:table-cell table:style-name="Table2.A1" office:value-type="string">
            <text:p text:style-name="Table_20_Contents"><text:span text:style-name="Strong_20_Emphasis">Housing Unit Density</text:span> or <text:span text:style-name="Strong_20_Emphasis">Count</text:span></text:p>
          </table:table-cell>
          <table:table-cell table:style-name="Table2.A1" office:value-type="string">
            <text:p text:style-name="Table_20_Contents">Presence and magnitude of housing per hex.</text:p>
          </table:table-cell>
        </table:table-row>
        <table:table-row>
          <table:table-cell table:style-name="Table2.A1" office:value-type="string">
            <text:p text:style-name="Table_20_Contents">Optional label</text:p>
          </table:table-cell>
          <table:table-cell table:style-name="Table2.A1" office:value-type="string">
            <text:p text:style-name="Table_20_Contents"><text:span text:style-name="Strong_20_Emphasis">Community Wildfire Risk Reduction Zones</text:span></text:p>
          </table:table-cell>
          <table:table-cell table:style-name="Table2.A1" office:value-type="string">
            <text:p text:style-name="Table_20_Contents">Minimal / Indirect / Direct / Transmission—dashboard context, not v1 action cascade.</text:p>
          </table:table-cell>
        </table:table-row>
        <table:table-row>
          <table:table-cell table:style-name="Table2.A1" office:value-type="string">
            <text:p text:style-name="Table_20_Contents">Optional triangulation</text:p>
          </table:table-cell>
          <table:table-cell table:style-name="Table2.A1" office:value-type="string">
            <text:p text:style-name="Table_20_Contents"><text:span text:style-name="Strong_20_Emphasis">Risk to Potential Structures</text:span> (“Risk to Homes”)</text:p>
          </table:table-cell>
          <table:table-cell table:style-name="Table2.A1" office:value-type="string">
            <text:p text:style-name="Table_20_Contents">Wall-to-wall risk <text:span text:style-name="Emphasis">if</text:span> a home were there. Not primary for Protect (no homes required).</text:p>
          </table:table-cell>
        </table:table-row>
      </table:table>
      <text:p text:style-name="Text_20_body"><text:span text:style-name="Strong_20_Emphasis">Not primary for v1 people scoring:</text:span> Housing Unit Impact (no likelihood); WRTC burn probability / WHP as a second hazard (project hazard is <text:span text:style-name="Strong_20_Emphasis">WFE</text:span>); Building Count (prefer Housing Unit); Population (equity later).</text:p>
      <text:p text:style-name="Text_20_body"><text:a xlink:type="simple" xlink:href="https://silvis.forest.wisc.edu/data/wui-change/" text:style-name="Internet_20_link" text:visited-style-name="Visited_20_Internet_20_Link">SILVIS WUI</text:a> remains an optional label only (2020).</text:p>
      <text:h text:style-name="Heading_20_2" text:outline-level="2">6. Ecosystem logic (EVT) and WFE</text:h>
      <text:p text:style-name="Text_20_body"><text:span text:style-name="Strong_20_Emphasis">WFE</text:span> (existing hex <text:span text:style-name="Source_20_Text">MEAN</text:span> / <text:span text:style-name="Source_20_Text">WFE_CAT</text:span>) is the landscape exposure / transmission surface—priority and, when high and not already Protect/peat, the trigger for Restore with beneficial fire.</text:p>
      <text:p text:style-name="Text_20_body"><text:span text:style-name="Strong_20_Emphasis">LANDFIRE EVT (v1):</text:span> only two jobs—flag <text:span text:style-name="Strong_20_Emphasis">peat</text:span> → Defer; flag <text:span text:style-name="Strong_20_Emphasis">plantations</text:span> → Protect. No full EVT-name → action table (condition within an EVT, e.g. thinned vs dense pine–oak, needs overlays later). See <text:span text:style-name="Source_20_Text">config/EVT_RULES_LOGIC.md</text:span>.</text:p>
      <text:h text:style-name="Heading_20_2" text:outline-level="2">7. Dashboard and disturbances</text:h>
      <text:list text:style-name="L5">
        <text:list-item>
          <text:p text:style-name="P10">First draft from Randy’s scoring rules, weights, and value list </text:p>
        </text:list-item>
        <text:list-item>
          <text:p text:style-name="P10"><text:span text:style-name="Strong_20_Emphasis">Built in R / Quarto</text:span>, hosted on GitHub Pages; consumes hex outputs pushed from ArcGIS Pro </text:p>
        </text:list-item>
        <text:list-item>
          <text:p text:style-name="P10">Presets: People-first | Plantation-asset-first | Biodiversity/recreation-first (stronger PAD multiplier) | Balanced </text:p>
        </text:list-item>
        <text:list-item>
          <text:p text:style-name="P10">Toggle disturbance polygons (ice storm, fire); when on, calibrate actions; when off, show baseline </text:p>
        </text:list-item>
        <text:list-item>
          <text:p text:style-name="P11">Versioned files in <text:span text:style-name="Source_20_Text">data/disturbances/</text:span>; optional later GitHub Actions ingest </text:p>
        </text:list-item>
      </text:list>
      <text:h text:style-name="Heading_20_2" text:outline-level="2">8. Mills and low-value wood</text:h>
      <text:p text:style-name="Text_20_body">Utilization is part of feasibility (distance to buyers; opportunity vs constrained).</text:p>
      <text:p text:style-name="Text_20_body">Sources: <text:a xlink:type="simple" xlink:href="https://www2.dnr.state.mi.us/mfid/" text:style-name="Internet_20_link" text:visited-style-name="Visited_20_Internet_20_Link">MI</text:a> · <text:a xlink:type="simple" xlink:href="https://dnr.wisconsin.gov/topic/forestbusinesses/industries" text:style-name="Internet_20_link" text:visited-style-name="Visited_20_Internet_20_Link">WI</text:a> · <text:a xlink:type="simple" xlink:href="https://www.dnr.state.mn.us/forestry/um/index.html" text:style-name="Internet_20_link" text:visited-style-name="Visited_20_Internet_20_Link">MN</text:a> · <text:a xlink:type="simple" xlink:href="https://primary.forestproductslocator.org/mill-map" text:style-name="Internet_20_link" text:visited-style-name="Visited_20_Internet_20_Link">Primary Forest Products mill map</text:a>. USFS <text:a xlink:type="simple" xlink:href="https://research.fs.usda.gov/programs/nrum" text:style-name="Internet_20_link" text:visited-style-name="Visited_20_Internet_20_Link">TPO</text:a> = aggregates only (mill points confidential).</text:p>
      <text:h text:style-name="Heading_20_2" text:outline-level="2">9. Carbon, smoke, FIA</text:h>
      <text:list text:style-name="L6">
        <text:list-item>
          <text:p text:style-name="P12"><text:span text:style-name="Strong_20_Emphasis">Carbon:</text:span> not a v1 ranking driver </text:p>
        </text:list-item>
        <text:list-item>
          <text:p text:style-name="P12"><text:span text:style-name="Strong_20_Emphasis">Smoke:</text:span> <text:a xlink:type="simple" xlink:href="https://www.pnas.org/doi/10.1073/pnas.2613722123" text:style-name="Internet_20_link" text:visited-style-name="Visited_20_Internet_20_Link">PNAS</text:a>—Rx fire often increases net PM2.5 under current conditions; still essential for ecology and hazard where logic supports it </text:p>
        </text:list-item>
        <text:list-item>
          <text:p text:style-name="P13"><text:span text:style-name="Strong_20_Emphasis">FIA:</text:span> no for v1 hex scoring. Optional later via <text:a xlink:type="simple" xlink:href="https://research.fs.usda.gov/firelab/products/dataandtools/treemap-tree-level-model-united-states-forests" text:style-name="Internet_20_link" text:visited-style-name="Visited_20_Internet_20_Link">TreeMap</text:a> on priority hexes only </text:p>
        </text:list-item>
      </text:list>
      <text:h text:style-name="Heading_20_2" text:outline-level="2">10. Example relevant efforts from around the region</text:h>
      <text:p text:style-name="Text_20_body">Not exhaustive. Prefer priorities that can hand off to existing work.</text:p>
      <text:list text:style-name="L7">
        <text:list-item>
          <text:p text:style-name="P14"><text:span text:style-name="Strong_20_Emphasis">MN:</text:span> <text:a xlink:type="simple" xlink:href="https://www.fs.usda.gov/r09/superior/natural-resources/forest-management/arrowhead-landscape-pilot-project" text:style-name="Internet_20_link" text:visited-style-name="Visited_20_Internet_20_Link">Arrowhead Landscape Pilot</text:a>; Superior NF co-stewardship (Bois Forte, Fond du Lac, Grand Portage); <text:a xlink:type="simple" xlink:href="https://www.minnesotafac.org/" text:style-name="Internet_20_link" text:visited-style-name="Visited_20_Internet_20_Link">MN Fire Adapted Communities</text:a> </text:p>
        </text:list-item>
        <text:list-item>
          <text:p text:style-name="P14"><text:span text:style-name="Strong_20_Emphasis">WI:</text:span> <text:a xlink:type="simple" xlink:href="https://dnr.wisconsin.gov/topic/forestmanagement/gnaGeneralInfo" text:style-name="Internet_20_link" text:visited-style-name="Visited_20_Internet_20_Link">CNNF Good Neighbor Authority</text:a>; northern CWPPs; <text:a xlink:type="simple" xlink:href="https://www.superiorwi.gov/DocumentCenter/View/16070/Wisconsin_Point_Fire_Restoration_Fact_Sheet_2025" text:style-name="Internet_20_link" text:visited-style-name="Visited_20_Internet_20_Link">Wisconsin Point fire restoration</text:a> </text:p>
        </text:list-item>
        <text:list-item>
          <text:p text:style-name="P14"><text:span text:style-name="Strong_20_Emphasis">MI:</text:span> <text:a xlink:type="simple" xlink:href="https://www.michigan.gov/dnr/about/newsroom/storm-recovery" text:style-name="Internet_20_link" text:visited-style-name="Visited_20_Internet_20_Link">2025 ice storm recovery</text:a>; Hiawatha/Ottawa Rx fire; CWPPs; Two Hearted / TNC UP </text:p>
        </text:list-item>
        <text:list-item>
          <text:p text:style-name="P15"><text:span text:style-name="Strong_20_Emphasis">Regional:</text:span> <text:a xlink:type="simple" xlink:href="https://compacts.csg.org/compact/great-lakes-forest-fire-compact/" text:style-name="Internet_20_link" text:visited-style-name="Visited_20_Internet_20_Link">Great Lakes Forest Fire Compact</text:a>; <text:a xlink:type="simple" xlink:href="https://gacc.nifc.gov/eacc/" text:style-name="Internet_20_link" text:visited-style-name="Visited_20_Internet_20_Link">EACC</text:a>; <text:a xlink:type="simple" xlink:href="https://www.nature.org/en-us/about-us/where-we-work/priority-landscapes/great-lakes/stories-in-the-great-lakes/great-lakes-northwoods/" text:style-name="Internet_20_link" text:visited-style-name="Visited_20_Internet_20_Link">TNC Great Lakes Northwoods</text:a> </text:p>
        </text:list-item>
      </text:list>
      <text:h text:style-name="Heading_20_2" text:outline-level="2">11. Implementation</text:h>
      <text:p text:style-name="Text_20_body"><text:span text:style-name="Strong_20_Emphasis">Stack:</text:span></text:p>
      <text:list text:style-name="L8">
        <text:list-item>
          <text:p text:style-name="P16"><text:span text:style-name="Strong_20_Emphasis">ArcGIS Pro</text:span> — primary GIS workspace (partner preference). Rasters, geodatabases, and the <text:span text:style-name="Source_20_Text">.aprx</text:span> stay local. </text:p>
        </text:list-item>
        <text:list-item>
          <text:p text:style-name="P16"><text:span text:style-name="Strong_20_Emphasis">Python</text:span> — scoring and zonals in this repo’s <text:span text:style-name="Source_20_Text">src/</text:span> (arcpy / Pro Python). </text:p>
        </text:list-item>
        <text:list-item>
          <text:p text:style-name="P16"><text:span text:style-name="Strong_20_Emphasis">R / Quarto</text:span> — draft dashboard only; reads pushed hex GeoJSON/CSV; does not reimplement scoring. </text:p>
        </text:list-item>
        <text:list-item>
          <text:p text:style-name="P17">Do not modify <text:a xlink:type="simple" xlink:href="https://github.com/rswaty/northwoods" text:style-name="Internet_20_link" text:visited-style-name="Visited_20_Internet_20_Link">rswaty/northwoods</text:a> (read-only prior work). </text:p>
        </text:list-item>
      </text:list>
      <text:p text:style-name="Body_20_Text.note"><text:span text:style-name="Strong_20_Emphasis">Workflow:</text:span> edit Python here → run in ArcGIS Pro on local rasters → push <text:span text:style-name="Emphasis">hexes and small vectors only</text:span> → update R dashboard. <text:span text:style-name="Strong_20_Emphasis">Never commit rasters</text:span> (LANDFIRE, WRTC, WHP, etc.), raster zips, file geodatabases, or the Pro project.</text:p>
      <text:p text:style-name="Text_20_body"><text:span text:style-name="Strong_20_Emphasis">Division of labor:</text:span> Pro + Python write the truth tables; R draws the map.</text:p>
      <text:p text:style-name="Text_20_body"><text:span text:style-name="Strong_20_Emphasis">Phases:</text:span> (1) regional hex scores + action classes in Pro → (2) push hex outputs; Quarto dashboard + disturbance toggles → (3) mills + case studies → (4) nested hexes; PAD categories; optional TreeMap / EVT workshop.</text:p>
      <text:p text:style-name="Text_20_body"><text:span text:style-name="Strong_20_Emphasis">Near term:</text:span> download WRTC state GIS (HU Risk, Exposure, Density/Count); copy WFE hexes into Pro; join WRTC + PAD-US + EVT flags; export Goldilocks hex GeoJSON; push; refresh Quarto sketch.</text:p>
      <text:h text:style-name="Heading_20_2" text:outline-level="2">12. Open items</text:h>
      <text:list text:style-name="L9">
        <text:list-item>
          <text:p text:style-name="P18">Numeric thresholds for “high” WRTC / WFE (v1 uses top ~30% within AOI) </text:p>
        </text:list-item>
        <text:list-item>
          <text:p text:style-name="P18">Goldilocks capacity caps; case-study boundaries </text:p>
        </text:list-item>
        <text:list-item>
          <text:p text:style-name="P18">PAD category weighting scheme </text:p>
        </text:list-item>
        <text:list-item>
          <text:p text:style-name="P18">Disturbance automation sources </text:p>
        </text:list-item>
        <text:list-item>
          <text:p text:style-name="P19">Timing of any multi-partner EVT workshop / condition overlays </text:p>
        </text:list-item>
      </text:list>
      <text:h text:style-name="Heading_20_2" text:outline-level="2">13. Key links</text:h>
      <text:list text:style-name="L10">
        <text:list-item>
          <text:p text:style-name="P20"><text:a xlink:type="simple" xlink:href="https://rswaty.github.io/northwoods/" text:style-name="Internet_20_link" text:visited-style-name="Visited_20_Internet_20_Link">Existing Northwoods assessment</text:a> · <text:a xlink:type="simple" xlink:href="https://github.com/rswaty/northwoods" text:style-name="Internet_20_link" text:visited-style-name="Visited_20_Internet_20_Link">repo</text:a> </text:p>
        </text:list-item>
        <text:list-item>
          <text:p text:style-name="P20"><text:a xlink:type="simple" xlink:href="https://wildfirerisk.org/" text:style-name="Internet_20_link" text:visited-style-name="Visited_20_Internet_20_Link">Wildfire Risk to Communities</text:a> · <text:a xlink:type="simple" xlink:href="https://wildfirerisk.org/download/" text:style-name="Internet_20_link" text:visited-style-name="Visited_20_Internet_20_Link">download</text:a> · repo note <text:span text:style-name="Source_20_Text">config/WRTC_DATASETS.md</text:span> </text:p>
        </text:list-item>
        <text:list-item>
          <text:p text:style-name="P20"><text:a xlink:type="simple" xlink:href="https://research.fs.usda.gov/firelab/products/dataandtools/wildfire-hazard-potential" text:style-name="Internet_20_link" text:visited-style-name="Visited_20_Internet_20_Link">Wildfire Hazard Potential</text:a> (triangulation only) </text:p>
        </text:list-item>
        <text:list-item>
          <text:p text:style-name="P20"><text:a xlink:type="simple" xlink:href="https://landfire.gov/" text:style-name="Internet_20_link" text:visited-style-name="Visited_20_Internet_20_Link">LANDFIRE</text:a> · <text:a xlink:type="simple" xlink:href="https://landfire.gov/vegetation/evt" text:style-name="Internet_20_link" text:visited-style-name="Visited_20_Internet_20_Link">EVT</text:a> </text:p>
        </text:list-item>
        <text:list-item>
          <text:p text:style-name="P20"><text:a xlink:type="simple" xlink:href="https://www.usgs.gov/programs/gap-analysis-project/science/pad-us-data-download" text:style-name="Internet_20_link" text:visited-style-name="Visited_20_Internet_20_Link">PAD-US</text:a> · <text:a xlink:type="simple" xlink:href="https://silvis.forest.wisc.edu/data/wui-change/" text:style-name="Internet_20_link" text:visited-style-name="Visited_20_Internet_20_Link">SILVIS WUI</text:a> </text:p>
        </text:list-item>
        <text:list-item>
          <text:p text:style-name="P20"><text:a xlink:type="simple" xlink:href="https://www.pnas.org/doi/10.1073/pnas.2613722123" text:style-name="Internet_20_link" text:visited-style-name="Visited_20_Internet_20_Link">PNAS — Rx fire and PM2.5</text:a> </text:p>
        </text:list-item>
        <text:list-item>
          <text:p text:style-name="P20"><text:a xlink:type="simple" xlink:href="https://conservation-data-lab.github.io/cup_assessment/fire.html" text:style-name="Internet_20_link" text:visited-style-name="Visited_20_Internet_20_Link">CUP WFE methods</text:a> </text:p>
        </text:list-item>
        <text:list-item>
          <text:p text:style-name="P20"><text:a xlink:type="simple" xlink:href="https://doi.org/10.2737/RDS-2016-0003" text:style-name="Internet_20_link" text:visited-style-name="Visited_20_Internet_20_Link">Bailey ecoregions (AOI)</text:a> </text:p>
        </text:list-item>
        <text:list-item>
          <text:p text:style-name="P20"><text:a xlink:type="simple" xlink:href="https://data.fs.usda.gov/geodata/rastergateway/treemap/" text:style-name="Internet_20_link" text:visited-style-name="Visited_20_Internet_20_Link">TreeMap</text:a> · <text:a xlink:type="simple" xlink:href="https://research.fs.usda.gov/programs/fia" text:style-name="Internet_20_link" text:visited-style-name="Visited_20_Internet_20_Link">FIA</text:a> </text:p>
        </text:list-item>
        <text:list-item>
          <text:p text:style-name="P21">Repo logic: <text:span text:style-name="Source_20_Text">config/ACTION_ASSIGNMENT.md</text:span> · <text:span text:style-name="Source_20_Text">config/EVT_RULES_LOGIC.md</text:span>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, Arial, sans-serif"/>
    <style:font-face style:name="Consolas" svg:font-family="Consolas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45%" fo:orphans="48"/>
      <style:text-properties fo:color="#222222" loext:opacity="100%" style:font-name="Calibri" fo:font-family="Calibri, Arial, sans-serif" style:font-name-asian="Calibri" style:font-family-asian="Calibri, Arial, sans-serif" style:font-name-complex="Calibri" style:font-family-complex="Calibri, Arial, sans-serif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paragraph-properties fo:text-align="left" style:justify-single-word="false"/>
    </style:style>
    <style:style style:name="Heading_20_1" style:display-name="Heading 1" style:family="paragraph" style:parent-style-name="Heading" style:next-style-name="Text_20_body" style:class="chapter">
      <style:text-properties fo:font-size="24pt" fo:font-weight="bold" style:font-size-asian="24pt" style:font-weight-asian="bold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Heading" style:family="paragraph" style:parent-style-name="Standard" style:next-style-name="Text_20_body" style:class="chapter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 fo:padding-left="0in" fo:padding-right="0in" fo:padding-top="0in" fo:padding-bottom="0.0193in" fo:border-left="none" fo:border-right="none" fo:border-top="none" fo:border-bottom="0.06pt solid #cccccc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ody_20_Text.note" style:display-name="Body Text.note" style:family="paragraph" style:parent-style-name="Text_20_body">
      <style:paragraph-properties fo:padding-left="0.0193in" fo:padding-right="0in" fo:padding-top="0in" fo:padding-bottom="0in" fo:border-left="2.24pt solid #555555" fo:border-right="none" fo:border-top="none" fo:border-bottom="none"/>
    </style:style>
    <style:style style:name="Table_20_Heading" style:display-name="Table Heading" style:family="paragraph" style:parent-style-name="Table_20_Contents" style:class="extra">
      <style:paragraph-properties fo:text-align="left" style:justify-single-word="false" text:number-lines="false" text:line-number="0"/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645ad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Consolas" fo:font-family="Consolas, monospace" style:font-name-asian="Consolas" style:font-family-asian="Consolas, monospace" style:font-name-complex="Consolas" style:font-family-complex="Consolas, monospac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0645ad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Next Gen FNA — Northwoods</dc:title>
    <meta:document-statistic meta:table-count="2" meta:image-count="0" meta:object-count="0" meta:page-count="1" meta:paragraph-count="129" meta:word-count="1406" meta:character-count="9107" meta:non-whitespace-character-count="7831"/>
    <meta:generator>LibreOffice/26.2.4.2$Linux_X86_64 LibreOffice_project/3346a99e6b841765b75a9b29714a5b95c6761ce3</meta:generator>
    <meta:user-defined meta:name=""/>
  </office:meta>
</office:document-meta>
</file>